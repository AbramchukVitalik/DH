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1000002364D6E09BA.png" manifest:media-type="image/png"/>
  <manifest:file-entry manifest:full-path="Pictures/1000000000000518000002160CD3D139.png" manifest:media-type="image/png"/>
  <manifest:file-entry manifest:full-path="Pictures/100000000000020000000197E2A282A9.png" manifest:media-type="image/png"/>
  <manifest:file-entry manifest:full-path="Pictures/10000000000001EB000002FEF8C43931.png" manifest:media-type="image/png"/>
  <manifest:file-entry manifest:full-path="Pictures/10000000000001E9000000EA4E275DDF.png" manifest:media-type="image/png"/>
  <manifest:file-entry manifest:full-path="Pictures/10000000000004F50000020F930F98B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1.104cm" style:rel-column-width="42803*"/>
    </style:style>
    <style:style style:name="Таблица1.B" style:family="table-column">
      <style:table-column-properties style:column-width="5.897cm" style:rel-column-width="22732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3pt" fo:language="ru" fo:country="RU" fo:font-weight="bold" officeooo:rsid="00163b68" officeooo:paragraph-rsid="00163b68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2d3c9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paragraph-rsid="000dbaac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language="ru" fo:country="RU" fo:font-weight="normal" officeooo:rsid="0028da42" officeooo:paragraph-rsid="0028da42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2db74b"/>
    </style:style>
    <style:style style:name="P6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font-size="12pt" fo:font-weight="bold" officeooo:paragraph-rsid="000dbaac" style:font-size-asian="10.5pt" style:font-weight-asian="bold" style:font-size-complex="12pt" style:font-weight-complex="bold"/>
    </style:style>
    <style:style style:name="P7" style:family="paragraph" style:parent-style-name="Text_20_body" style:list-style-name="L1">
      <style:paragraph-properties fo:margin-top="0.101cm" fo:margin-bottom="0.101cm" style:contextual-spacing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paragraph-rsid="000dbaac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10" style:family="paragraph" style:parent-style-name="Heading_20_3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2">
      <style:text-properties style:font-name="Times New Roman1"/>
    </style:style>
    <style:style style:name="P12" style:family="paragraph" style:parent-style-name="Text_20_body" style:list-style-name="L3"/>
    <style:style style:name="P13" style:family="paragraph" style:parent-style-name="Text_20_body" style:list-style-name="L2"/>
    <style:style style:name="P14" style:family="paragraph" style:parent-style-name="Text_20_body" style:list-style-name="L2">
      <style:text-properties officeooo:paragraph-rsid="002a6cff"/>
    </style:style>
    <style:style style:name="P15" style:family="paragraph" style:parent-style-name="Text_20_body">
      <style:paragraph-properties fo:text-align="start" style:justify-single-word="false"/>
      <style:text-properties fo:font-size="12pt" fo:font-weight="bold" officeooo:paragraph-rsid="000dbaac" style:font-size-asian="10.5pt" style:font-weight-asian="bold" style:font-size-complex="12pt" style:font-weight-complex="bold"/>
    </style:style>
    <style:style style:name="P16" style:family="paragraph" style:parent-style-name="Heading_20_2">
      <style:paragraph-properties fo:margin-top="0cm" fo:margin-bottom="0cm" style:contextual-spacing="false" fo:text-align="start" style:justify-single-word="false"/>
      <style:text-properties fo:font-size="12pt" fo:font-weight="bold" officeooo:paragraph-rsid="000dbaac" style:font-size-asian="10.5pt" style:font-weight-asian="bold" style:font-size-complex="12pt" style:font-weight-complex="bold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fo:font-size="12pt" fo:font-weight="bold" officeooo:paragraph-rsid="000dbaac" style:font-size-asian="10.5pt" style:font-weight-asian="bold" style:font-size-complex="12pt" style:font-weight-complex="bold"/>
    </style:style>
    <style:style style:name="P18" style:family="paragraph" style:parent-style-name="Heading_20_2">
      <style:paragraph-properties fo:margin-top="0cm" fo:margin-bottom="0cm" style:contextual-spacing="false" fo:text-align="start" style:justify-single-word="false"/>
      <style:text-properties fo:font-size="13pt" fo:font-weight="bold" officeooo:paragraph-rsid="000dbaac" style:font-size-asian="13pt" style:font-weight-asian="bold" style:font-size-complex="13pt" style:font-weight-complex="bold"/>
    </style:style>
    <style:style style:name="P19" style:family="paragraph" style:parent-style-name="Text_20_body">
      <style:paragraph-properties fo:margin-top="0cm" fo:margin-bottom="0cm" style:contextual-spacing="false" fo:text-align="start" style:justify-single-word="false"/>
      <style:text-properties fo:font-size="12pt" fo:font-weight="bold" officeooo:paragraph-rsid="000dbaac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Heading_20_3">
      <style:paragraph-properties fo:margin-top="0cm" fo:margin-bottom="0cm" style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 style:list-style-name="L5">
      <style:paragraph-properties fo:margin-top="0cm" fo:margin-bottom="0.046cm" style:contextual-spacing="false"/>
    </style:style>
    <style:style style:name="P24" style:family="paragraph" style:parent-style-name="Text_20_body" style:list-style-name="L6">
      <style:paragraph-properties fo:margin-top="0cm" fo:margin-bottom="0.046cm" style:contextual-spacing="false"/>
      <style:text-properties officeooo:paragraph-rsid="002f43a1"/>
    </style:style>
    <style:style style:name="P25" style:family="paragraph" style:parent-style-name="Standard">
      <style:paragraph-properties fo:text-align="start" style:justify-single-word="false"/>
      <style:text-properties fo:font-weight="normal" officeooo:paragraph-rsid="00149308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normal" officeooo:paragraph-rsid="0028da42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3pt" fo:language="ru" fo:country="RU" fo:font-weight="bold" officeooo:rsid="00149308" officeooo:paragraph-rsid="00149308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3pt" fo:font-weight="bold" officeooo:paragraph-rsid="00149308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3pt" fo:language="en" fo:country="US" fo:font-weight="bold" officeooo:rsid="0016ac8d" officeooo:paragraph-rsid="00149308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3pt" fo:language="en" fo:country="US" fo:font-weight="bold" officeooo:rsid="0016ac8d" officeooo:paragraph-rsid="0016ac8d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d6905" officeooo:paragraph-rsid="0016ac8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1pt" fo:language="ru" fo:country="RU" fo:font-weight="normal" officeooo:rsid="002db74b" officeooo:paragraph-rsid="002db74b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14062" officeooo:paragraph-rsid="0021406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language="ru" fo:country="RU" fo:font-weight="bold" officeooo:rsid="0016ac8d" officeooo:paragraph-rsid="0016ac8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language="ru" fo:country="RU" fo:font-weight="bold" officeooo:rsid="0016ac8d" officeooo:paragraph-rsid="0016ac8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6ac8d" officeooo:paragraph-rsid="0016ac8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26de5" officeooo:paragraph-rsid="00226de5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3pt" fo:language="ru" fo:country="RU" fo:font-weight="normal" officeooo:rsid="001d0585" officeooo:paragraph-rsid="00226de5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bb266" officeooo:paragraph-rsid="001bb26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3pt" fo:language="ru" fo:country="RU" fo:font-weight="normal" officeooo:rsid="001bb266" officeooo:paragraph-rsid="001bb266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3pt" fo:language="ru" fo:country="RU" fo:font-weight="normal" officeooo:rsid="0016ac8d" officeooo:paragraph-rsid="0016ac8d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3pt" fo:language="ru" fo:country="RU" fo:font-weight="bold" officeooo:rsid="00196b21" officeooo:paragraph-rsid="00196b21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3pt" fo:language="ru" fo:country="RU" fo:font-weight="bold" officeooo:rsid="001e86c7" officeooo:paragraph-rsid="001e86c7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3pt" fo:language="ru" fo:country="RU" fo:font-weight="bold" officeooo:rsid="00196b21" officeooo:paragraph-rsid="001e86c7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3pt" fo:language="en" fo:country="US" fo:font-weight="bold" officeooo:rsid="0023612b" officeooo:paragraph-rsid="001e86c7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1pt" fo:font-weight="normal" officeooo:rsid="0028da42" officeooo:paragraph-rsid="002db74b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3pt" fo:language="en" fo:country="US" fo:font-weight="bold" officeooo:rsid="00196b21" officeooo:paragraph-rsid="00196b21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officeooo:paragraph-rsid="002a6cff"/>
    </style:style>
    <style:style style:name="P49" style:family="paragraph" style:parent-style-name="Standard">
      <style:paragraph-properties fo:text-align="start" style:justify-single-word="false"/>
      <style:text-properties fo:font-size="13pt" fo:language="en" fo:country="US" fo:font-weight="normal" officeooo:rsid="001976cf" officeooo:paragraph-rsid="0019cb40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3pt" fo:language="en" fo:country="US" fo:font-weight="normal" officeooo:rsid="001976cf" officeooo:paragraph-rsid="0026814a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3pt" fo:language="ru" fo:country="RU" fo:font-weight="normal" officeooo:rsid="00196b21" officeooo:paragraph-rsid="00196b21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3pt" fo:language="ru" fo:country="RU" fo:font-weight="normal" officeooo:rsid="00263a06" officeooo:paragraph-rsid="00263a06" style:font-size-asian="13pt" style:font-weight-asian="normal" style:font-size-complex="13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size="13pt" fo:font-weight="bold" officeooo:rsid="00263a06" officeooo:paragraph-rsid="00263a06" style:font-size-asian="13pt" style:font-weight-asian="bold" style:font-size-complex="13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3pt" fo:language="en" fo:country="US" fo:font-weight="bold" officeooo:rsid="00263a06" officeooo:paragraph-rsid="00263a06" style:font-size-asian="13pt" style:font-weight-asian="bold" style:font-size-complex="13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size="13pt" fo:language="ru" fo:country="RU" officeooo:rsid="00263a06" officeooo:paragraph-rsid="00263a06" style:font-size-asian="13pt" style:font-size-complex="13pt"/>
    </style:style>
    <style:style style:name="P56" style:family="paragraph" style:parent-style-name="Table_20_Contents">
      <style:paragraph-properties fo:text-align="start" style:justify-single-word="false"/>
      <style:text-properties fo:font-size="13pt" fo:language="en" fo:country="US" officeooo:rsid="00263a06" officeooo:paragraph-rsid="00263a06" style:font-size-asian="13pt" style:font-size-complex="13pt"/>
    </style:style>
    <style:style style:name="P57" style:family="paragraph" style:parent-style-name="Table_20_Contents">
      <style:paragraph-properties fo:text-align="start" style:justify-single-word="false"/>
      <style:text-properties fo:font-size="13pt" officeooo:rsid="00263a06" officeooo:paragraph-rsid="00263a06" style:font-size-asian="13pt" style:font-size-complex="13pt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196b21" officeooo:paragraph-rsid="00263a06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size="13pt" officeooo:rsid="0026814a" officeooo:paragraph-rsid="00292544" style:font-size-asian="13pt" style:font-size-complex="13pt"/>
    </style:style>
    <style:style style:name="P60" style:family="paragraph" style:parent-style-name="Table_20_Contents">
      <style:paragraph-properties fo:text-align="start" style:justify-single-word="false"/>
      <style:text-properties fo:font-size="13pt" officeooo:rsid="00263a06" officeooo:paragraph-rsid="0026814a" style:font-size-asian="13pt" style:font-size-complex="13pt"/>
    </style:style>
    <style:style style:name="T1" style:family="text">
      <style:text-properties officeooo:rsid="002e8224"/>
    </style:style>
    <style:style style:name="T2" style:family="text">
      <style:text-properties officeooo:rsid="002a6cff"/>
    </style:style>
    <style:style style:name="T3" style:family="text">
      <style:text-properties fo:font-size="13pt" fo:language="ru" fo:country="RU" fo:font-weight="bold" officeooo:rsid="000dbaac" style:font-size-asian="13pt" style:font-weight-asian="bold" style:font-size-complex="13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2d3c9d" style:font-size-asian="13pt" style:font-weight-asian="bold" style:font-size-complex="13pt" style:font-weight-complex="bold"/>
    </style:style>
    <style:style style:name="T6" style:family="text">
      <style:text-properties fo:font-size="11pt" fo:language="ru" fo:country="RU" fo:font-weight="normal" officeooo:rsid="0028da42" style:font-size-asian="11pt" style:font-weight-asian="normal" style:font-size-complex="11pt" style:font-weight-complex="normal"/>
    </style:style>
    <style:style style:name="T7" style:family="text">
      <style:text-properties fo:font-size="11pt" fo:language="ru" fo:country="RU" fo:font-weight="normal" officeooo:rsid="002db74b" style:font-size-asian="11pt" style:font-weight-asian="normal" style:font-size-complex="11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Times New Roman1"/>
    </style:style>
    <style:style style:name="T10" style:family="text">
      <style:text-properties fo:language="en" fo:country="US"/>
    </style:style>
    <style:style style:name="T11" style:family="text">
      <style:text-properties fo:language="ru" fo:country="RU"/>
    </style:style>
    <style:style style:name="T12" style:family="text">
      <style:text-properties style:font-name="Times New Roman1" fo:font-weight="normal" style:font-weight-asian="normal" style:font-weight-complex="normal"/>
    </style:style>
    <style:style style:name="T13" style:family="text">
      <style:text-properties fo:language="en" fo:country="US" officeooo:rsid="002f43a1"/>
    </style:style>
    <style:style style:name="T14" style:family="text">
      <style:text-properties fo:language="ru" fo:country="RU" officeooo:rsid="002b4fc5"/>
    </style:style>
    <style:style style:name="T15" style:family="text">
      <style:text-properties officeooo:rsid="002b4fc5"/>
    </style:style>
    <style:style style:name="T16" style:family="text">
      <style:text-properties fo:language="ru" fo:country="RU" fo:font-weight="normal" officeooo:rsid="00149308" style:font-weight-asian="normal" style:font-weight-complex="normal"/>
    </style:style>
    <style:style style:name="T17" style:family="text">
      <style:text-properties fo:font-family="'Times New Roman'" style:font-style-name="Полужирный" style:font-family-generic="roman" style:font-pitch="variable" fo:font-size="11pt" officeooo:rsid="0028da42" style:font-size-asian="11pt" style:font-size-complex="11pt"/>
    </style:style>
    <style:style style:name="T18" style:family="text">
      <style:text-properties fo:font-family="'Times New Roman'" style:font-style-name="Полужирный" style:font-family-generic="roman" style:font-pitch="variable" fo:font-size="11pt" fo:language="en" fo:country="US" officeooo:rsid="0028da42" style:font-size-asian="11pt" style:font-size-complex="11pt"/>
    </style:style>
    <style:style style:name="T19" style:family="text">
      <style:text-properties fo:font-family="'Times New Roman'" style:font-style-name="Полужирный" style:font-family-generic="roman" style:font-pitch="variable" fo:font-size="11pt" officeooo:rsid="002db74b" style:font-size-asian="11pt" style:font-size-complex="11pt"/>
    </style:style>
    <style:style style:name="T20" style:family="text">
      <style:text-properties fo:font-family="'Times New Roman'" style:font-style-name="Полужирный" style:font-family-generic="roman" style:font-pitch="variable" fo:font-size="11pt" fo:language="ru" fo:country="RU" officeooo:rsid="00149308" style:font-size-asian="11pt" style:font-size-complex="11pt"/>
    </style:style>
    <style:style style:name="T21" style:family="text">
      <style:text-properties fo:font-family="'Times New Roman'" style:font-style-name="Полужирный" style:font-family-generic="roman" style:font-pitch="variable" fo:font-size="11pt" fo:language="ru" fo:country="RU" fo:font-weight="normal" officeooo:rsid="00149308" style:font-size-asian="11pt" style:font-weight-asian="normal" style:font-size-complex="11pt" style:font-weight-complex="normal"/>
    </style:style>
    <style:style style:name="T22" style:family="text">
      <style:text-properties fo:language="en" fo:country="US" officeooo:rsid="0016ac8d"/>
    </style:style>
    <style:style style:name="T23" style:family="text">
      <style:text-properties officeooo:rsid="002db74b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language="ru" fo:country="RU" fo:font-weight="normal" officeooo:rsid="001d6905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1d6905" style:font-size-asian="12pt" style:font-weight-asian="normal" style:font-size-complex="12pt" style:font-weight-complex="normal"/>
    </style:style>
    <style:style style:name="T29" style:family="text">
      <style:text-properties fo:language="en" fo:country="US" officeooo:rsid="00214062"/>
    </style:style>
    <style:style style:name="T30" style:family="text">
      <style:text-properties officeooo:rsid="00214062"/>
    </style:style>
    <style:style style:name="T31" style:family="text">
      <style:text-properties fo:font-family="'Courier New'" style:font-family-generic="modern" style:font-pitch="fixed" fo:font-size="12pt" style:font-size-asian="12pt" style:font-size-complex="12pt"/>
    </style:style>
    <style:style style:name="T32" style:family="text">
      <style:text-properties fo:font-family="'Courier New'" style:font-family-generic="modern" style:font-pitch="fixed" fo:font-size="12pt" officeooo:rsid="00214062" style:font-size-asian="12pt" style:font-size-complex="12pt"/>
    </style:style>
    <style:style style:name="T33" style:family="text">
      <style:text-properties fo:font-size="12pt" officeooo:rsid="00226de5" style:font-size-asian="12pt" style:font-size-complex="12pt"/>
    </style:style>
    <style:style style:name="T34" style:family="text">
      <style:text-properties fo:font-size="12pt" officeooo:rsid="001d6905" style:font-size-asian="12pt" style:font-size-complex="12pt"/>
    </style:style>
    <style:style style:name="T35" style:family="text">
      <style:text-properties fo:font-size="12pt" officeooo:rsid="0028da42" style:font-size-asian="12pt" style:font-size-complex="12pt"/>
    </style:style>
    <style:style style:name="T36" style:family="text">
      <style:text-properties fo:font-size="12pt" fo:language="en" fo:country="US" style:font-size-asian="12pt" style:font-size-complex="12pt"/>
    </style:style>
    <style:style style:name="T37" style:family="text">
      <style:text-properties fo:font-size="12pt" officeooo:rsid="002db74b" style:font-size-asian="12pt" style:font-size-complex="12pt"/>
    </style:style>
    <style:style style:name="T38" style:family="text">
      <style:text-properties fo:font-size="12pt" officeooo:rsid="001d0585" style:font-size-asian="12pt" style:font-size-complex="12pt"/>
    </style:style>
    <style:style style:name="T39" style:family="text">
      <style:text-properties fo:font-size="12pt" fo:language="en" fo:country="US" officeooo:rsid="001d0585" style:font-size-asian="12pt" style:font-size-complex="12pt"/>
    </style:style>
    <style:style style:name="T40" style:family="text">
      <style:text-properties fo:font-size="12pt" officeooo:rsid="002075f0" style:font-size-asian="12pt" style:font-size-complex="12pt"/>
    </style:style>
    <style:style style:name="T41" style:family="text">
      <style:text-properties fo:font-size="12pt" fo:language="en" fo:country="US" officeooo:rsid="001d6905" style:font-size-asian="12pt" style:font-size-complex="12pt"/>
    </style:style>
    <style:style style:name="T42" style:family="text">
      <style:text-properties fo:font-size="12pt" fo:language="en" fo:country="US" officeooo:rsid="0023612b" style:font-size-asian="12pt" style:font-size-complex="12pt"/>
    </style:style>
    <style:style style:name="T43" style:family="text">
      <style:text-properties fo:font-size="12pt" officeooo:rsid="0023612b" style:font-size-asian="12pt" style:font-size-complex="12pt"/>
    </style:style>
    <style:style style:name="T44" style:family="text">
      <style:text-properties fo:font-size="11pt" fo:font-weight="normal" officeooo:rsid="0028da42" style:font-size-asian="11pt" style:font-weight-asian="normal" style:font-size-complex="11pt" style:font-weight-complex="normal"/>
    </style:style>
    <style:style style:name="T45" style:family="text">
      <style:text-properties fo:font-size="11pt" fo:font-weight="normal" officeooo:rsid="002db74b" style:font-size-asian="11pt" style:font-weight-asian="normal" style:font-size-complex="11pt" style:font-weight-complex="normal"/>
    </style:style>
    <style:style style:name="T46" style:family="text">
      <style:text-properties fo:font-size="13pt" fo:language="ru" fo:country="RU" fo:font-weight="normal" officeooo:rsid="00196b21" style:font-size-asian="13pt" style:font-weight-asian="normal" style:font-size-complex="13pt" style:font-weight-complex="normal"/>
    </style:style>
    <style:style style:name="T47" style:family="text">
      <style:text-properties fo:font-size="13pt" fo:language="en" fo:country="US" fo:font-weight="normal" officeooo:rsid="00196b21" style:font-size-asian="13pt" style:font-weight-asian="normal" style:font-size-complex="13pt" style:font-weight-complex="normal"/>
    </style:style>
    <style:style style:name="T48" style:family="text">
      <style:text-properties fo:font-size="13pt" fo:language="ru" fo:country="RU" fo:font-weight="normal" officeooo:rsid="001976cf" style:font-size-asian="13pt" style:font-weight-asian="normal" style:font-size-complex="13pt" style:font-weight-complex="normal"/>
    </style:style>
    <style:style style:name="T49" style:family="text">
      <style:text-properties fo:font-size="13pt" fo:language="en" fo:country="US" fo:font-weight="normal" officeooo:rsid="001976cf" style:font-size-asian="13pt" style:font-weight-asian="normal" style:font-size-complex="13pt" style:font-weight-complex="normal"/>
    </style:style>
    <style:style style:name="T50" style:family="text">
      <style:text-properties fo:font-size="13pt" fo:language="ru" fo:country="RU" fo:font-weight="normal" officeooo:rsid="001a5a0c" style:font-size-asian="13pt" style:font-weight-asian="normal" style:font-size-complex="13pt" style:font-weight-complex="normal"/>
    </style:style>
    <style:style style:name="T51" style:family="text">
      <style:text-properties fo:font-size="13pt" fo:language="ru" fo:country="RU" fo:font-weight="normal" officeooo:rsid="0016ac8d" style:font-size-asian="13pt" style:font-weight-asian="normal" style:font-size-complex="13pt" style:font-weight-complex="normal"/>
    </style:style>
    <style:style style:name="T52" style:family="text">
      <style:text-properties fo:language="ru" fo:country="RU" officeooo:rsid="0019cb40"/>
    </style:style>
    <style:style style:name="T53" style:family="text">
      <style:text-properties officeooo:rsid="0019cb40"/>
    </style:style>
    <style:style style:name="T54" style:family="text">
      <style:text-properties fo:language="ru" fo:country="RU" officeooo:rsid="0027ae64"/>
    </style:style>
    <style:style style:name="T55" style:family="text">
      <style:text-properties fo:language="ru" fo:country="RU" officeooo:rsid="0026814a"/>
    </style:style>
    <style:style style:name="T56" style:family="text">
      <style:text-properties officeooo:rsid="00196b21"/>
    </style:style>
    <style:style style:name="T57" style:family="text">
      <style:text-properties officeooo:rsid="0026814a"/>
    </style:style>
    <style:style style:name="T58" style:family="text">
      <style:text-properties fo:language="ru" fo:country="RU" officeooo:rsid="0016ac8d"/>
    </style:style>
    <style:style style:name="T59" style:family="text">
      <style:text-properties fo:language="ru" fo:country="RU" officeooo:rsid="002a6cff"/>
    </style:style>
    <style:style style:name="T60" style:family="text">
      <style:text-properties fo:language="en" fo:country="US" fo:font-weight="normal" officeooo:rsid="0016ac8d" style:font-weight-asian="normal" style:font-weight-complex="normal"/>
    </style:style>
    <style:style style:name="T61" style:family="text">
      <style:text-properties fo:language="en" fo:country="US" fo:font-weight="normal" style:font-weight-asian="normal" style:font-weight-complex="normal"/>
    </style:style>
    <style:style style:name="T62" style:family="text">
      <style:text-properties fo:language="ru" fo:country="RU" officeooo:rsid="002925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118cm, 0.146cm, 1.5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607cm, 0cm, 0.62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1.14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482cm, 0.564cm, 5.944cm, 0.19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Руководство</text:span> по аппаратному <text:span text:style-name="T2">обеспечению</text:span></text:p>
      <text:p text:style-name="P1"/>
      <text:p text:style-name="P2"><text:span text:style-name="T3">ЛИДАР </text:span><text:span text:style-name="T4">TOF LiDAR AS-21C </text:span><text:span text:style-name="T5">(серийный номер 2407-015049JH)</text:span></text:p>
      <text:p text:style-name="P3"/>
      <text:p text:style-name="P3"><draw:frame draw:style-name="fr1" draw:name="Изображение1" text:anchor-type="char" svg:x="6.715cm" svg:y="0.019cm" svg:width="3.475cm" svg:height="4.396cm" draw:z-index="0"><draw:image xlink:href="Pictures/1000000000000221000002364D6E09B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6">Рисунок 1 — </text:span><text:span text:style-name="T7">Л</text:span><text:span text:style-name="T6">идар <text:s/>AS-21C</text:span></text:p>
      <text:p text:style-name="P4"/>
      <text:list text:style-name="L1">
        <text:list-item>
          <text:p text:style-name="P6"><text:span text:style-name="T8">Лидар использует </text:span><text:span text:style-name="Strong_20_Emphasis"><text:span text:style-name="T8">Ethernet 10/100 Мбит/с</text:span></text:span><text:span text:style-name="T8">.</text:span></text:p>
        </text:list-item>
        <text:list-item>
          <text:p text:style-name="P7"><text:span text:style-name="T8">Протокол: </text:span><text:span text:style-name="Strong_20_Emphasis"><text:span text:style-name="T8">TCP/IP</text:span></text:span><text:span text:style-name="T8"> (данные сканирования + конфигурация).</text:span></text:p>
        </text:list-item>
        <text:list-item>
          <text:p text:style-name="P7"><text:span text:style-name="T8">Передача данных идёт в виде </text:span><text:span text:style-name="Strong_20_Emphasis"><text:span text:style-name="T8">потока измерений</text:span></text:span><text:span text:style-name="T8"> через TCP‑порт (обычно фиксированный, указан в мануале).</text:span></text:p>
        </text:list-item>
      </text:list>
      <text:p text:style-name="P8"/>
      <text:p text:style-name="P9">Настройка сети (LAN) </text:p>
      <text:h text:style-name="P10" text:outline-level="3">Шаги:</text:h>
      <text:list xml:id="list2427891684" text:style-name="L2">
        <text:list-item>
          <text:p text:style-name="P11">Подключите лидар к ПК.</text:p>
        </text:list-item>
        <text:list-item>
          <text:p text:style-name="P11">На ПК установите статический IP в той же подсети, что и заводской IP лидара.</text:p>
        </text:list-item>
      </text:list>
      <text:list text:style-name="L3">
        <text:list-item>
          <text:list>
            <text:list-item>
              <text:p text:style-name="P12"><text:span text:style-name="T9">Обычно заводской IP — </text:span><text:span text:style-name="Strong_20_Emphasis"><text:span text:style-name="T9">192.168.1.XXX</text:span></text:span><text:span text:style-name="T9"> (в нашем случае заменён на </text:span><text:span text:style-name="Strong_20_Emphasis"><text:span text:style-name="T9">192.168.10.XXX</text:span></text:span><text:span text:style-name="T9">).</text:span></text:p>
            </text:list-item>
          </text:list>
        </text:list-item>
      </text:list>
      <text:list text:continue-list="list2427891684" text:style-name="L2">
        <text:list-item>
          <text:list>
            <text:list-item>
              <text:p text:style-name="P11">Стандартный порт 2112(<text:span text:style-name="T10">udp</text:span>) <text:span text:style-name="T11">и </text:span><text:span text:style-name="T10">2111(tcp)</text:span></text:p>
            </text:list-item>
          </text:list>
        </text:list-item>
        <text:list-item>
          <text:p text:style-name="P13"><text:span text:style-name="T9">Убедитесь, что сетевой интерфейс ПК в режиме </text:span><text:span text:style-name="Strong_20_Emphasis"><text:span text:style-name="T9">Private / Home network</text:span></text:span><text:span text:style-name="T9"> (Windows).</text:span></text:p>
        </text:list-item>
        <text:list-item>
          <text:p text:style-name="P13"><text:span text:style-name="T9">Откройте </text:span><text:span text:style-name="Strong_20_Emphasis"><text:span text:style-name="T9">LiDAR Diagnostic and Configuration Software (FILPS)</text:span></text:span><text:span text:style-name="T9"> — это официальный инструмент.</text:span></text:p>
          <text:list>
            <text:list-item>
              <text:p text:style-name="P13"><text:span text:style-name="T9">Программа автоматически обнаружит лидар через </text:span><text:span text:style-name="Strong_20_Emphasis"><text:span text:style-name="T9">broadcast</text:span></text:span><text:span text:style-name="T9">.</text:span></text:p>
            </text:list-item>
          </text:list>
        </text:list-item>
        <text:list-item>
          <text:p text:style-name="P13"><text:span text:style-name="T9">Если не обнаруживает — выполните </text:span><text:span text:style-name="Strong_20_Emphasis"><text:span text:style-name="T9">сканирование сети</text:span></text:span><text:span text:style-name="T9"> в FILPS.</text:span></text:p>
          <text:p text:style-name="P14"><text:span text:style-name="T9">(ссылка для скачивания </text:span><text:span text:style-name="Strong_20_Emphasis"><text:span text:style-name="T12">FILPS</text:span></text:span><text:span text:style-name="T9"> </text:span><text:a xlink:type="simple" xlink:href="https://www.sentronic.com/frontend/scripts/index.php?setMainAreaTemplatePath=mainarea_productlist.html&amp;groupId=2010" text:style-name="Internet_20_link" text:visited-style-name="Visited_20_Internet_20_Link"><text:span text:style-name="T9">https://www.sentronic.com/frontend/scripts/index.php?setMainAreaTemplatePath=mainarea_productlist.html&amp;groupId=2010</text:span></text:a><text:span text:style-name="T9">)</text:span></text:p>
        </text:list-item>
      </text:list>
      <text:p text:style-name="P15"/>
      <text:h text:style-name="P16" text:outline-level="2"/>
      <text:p text:style-name="P17"/>
      <text:p text:style-name="P17"/>
      <text:p text:style-name="P17"/>
      <text:p text:style-name="P17"/>
      <text:h text:style-name="P18" text:outline-level="2"><text:soft-page-break/>Получение данных сканирования</text:h>
      <text:p text:style-name="P19"/>
      <text:p text:style-name="P20"><text:tab/>AS‑21C передаёт данные по TCP. В FILPS можно включить режим просмотра данных, а также узнать параметры протокола.</text:p>
      <text:h text:style-name="P21" text:outline-level="3">Формат данных:</text:h>
      <text:list text:style-name="L4">
        <text:list-item>
          <text:p text:style-name="P22">Поток TCP‑пакетов с измерениями расстояний по углам.</text:p>
        </text:list-item>
        <text:list-item>
          <text:p text:style-name="P22">Угловое разрешение: 0.5° / 0.25° / 0.125°.</text:p>
        </text:list-item>
        <text:list-item>
          <text:p text:style-name="P22">Диапазон сканирования: 300°. </text:p>
        </text:list-item>
      </text:list>
      <text:h text:style-name="P21" text:outline-level="3">Как читать данные программно:</text:h>
      <text:list xml:id="list3081220304" text:style-name="L5">
        <text:list-item>
          <text:p text:style-name="P23"><text:span text:style-name="T8">Узнать </text:span><text:span text:style-name="Strong_20_Emphasis"><text:span text:style-name="T8">IP лидара</text:span></text:span><text:span text:style-name="T8"> и </text:span><text:span text:style-name="Strong_20_Emphasis"><text:span text:style-name="T8">порт данных</text:span></text:span><text:span text:style-name="T8"> в FILPS.</text:span></text:p>
        </text:list-item>
        <text:list-item>
          <text:p text:style-name="P23">Открыть TCP‑соединение из вашего ПО (Python/C++/ROS).</text:p>
        </text:list-item>
        <text:list-item>
          <text:p text:style-name="P23">Читать бинарный поток и парсить кадры.</text:p>
        </text:list-item>
      </text:list>
      <text:list text:style-name="L6">
        <text:list-item>
          <text:list>
            <text:list-item>
              <text:p text:style-name="P24">В мануале<text:span text:style-name="T13">(SDK-User's manual-AkuSense)</text:span> есть структура пакета.</text:p>
            </text:list-item>
          </text:list>
        </text:list-item>
      </text:list>
      <text:list text:continue-list="list3081220304" text:style-name="L5">
        <text:list-item>
          <text:p text:style-name="P23">Преобразовать расстояния<text:span text:style-name="T10"> </text:span><text:span text:style-name="T14">и </text:span>углы <text:span text:style-name="T15">в необходимый формат</text:span>.</text:p>
        </text:list-item>
      </text:list>
      <text:p text:style-name="P25"><text:span text:style-name="Strong_20_Emphasis"><text:span text:style-name="T16"/></text:span></text:p>
      <text:p text:style-name="P26"><draw:frame draw:style-name="fr2" draw:name="Изображение2" text:anchor-type="char" svg:x="0cm" svg:y="0.116cm" svg:width="17cm" svg:height="6.96cm" draw:z-index="3"><draw:image xlink:href="Pictures/1000000000000518000002160CD3D139.png" xlink:type="simple" xlink:show="embed" xlink:actuate="onLoad" draw:mime-type="image/png"/></draw:frame><text:span text:style-name="T17">Рисунок</text:span><text:span text:style-name="T18"> 2 </text:span><text:span text:style-name="T17">— </text:span><text:span text:style-name="T19">И</text:span><text:span text:style-name="T20">нтерфейс </text:span><text:span text:style-name="Strong_20_Emphasis"><text:span text:style-name="T21">FILPS</text:span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<text:s/>Камера <text:span text:style-name="T10">UNV </text:span>(<text:span text:style-name="T10">Thermal Camera </text:span><text:span text:style-name="T22">UV-T</text:span><text:span text:style-name="T10">IC2626S-F35-4F12AC-13</text:span>)</text:p>
      <text:p text:style-name="P28"/>
      <text:p text:style-name="P28"><draw:frame draw:style-name="fr3" draw:name="Изображение6" text:anchor-type="char" svg:x="0.467cm" svg:y="0.173cm" svg:width="8.68cm" svg:height="7.592cm" draw:z-index="1"><draw:image xlink:href="Pictures/100000000000020000000197E2A282A9.png" xlink:type="simple" xlink:show="embed" xlink:actuate="onLoad" draw:mime-type="image/png"/></draw:frame><draw:frame draw:style-name="fr4" draw:name="Изображение7" text:anchor-type="char" svg:x="8.991cm" svg:y="0.173cm" svg:width="8.641cm" svg:height="4.538cm" draw:z-index="2"><draw:image xlink:href="Pictures/10000000000001E9000000EA4E275DDF.png" xlink:type="simple" xlink:show="embed" xlink:actuate="onLoad" draw:mime-type="image/png"/></draw:frame><text:s/></text:p>
      <text:p text:style-name="P28"/>
      <text:p text:style-name="P28"/>
      <text:p text:style-name="P28"/>
      <text:p text:style-name="P28"/>
      <text:p text:style-name="P28"/>
      <text:p text:style-name="P4"/>
      <text:p text:style-name="P4">Рисунок<text:span text:style-name="T10"> 3 </text:span>— <text:span text:style-name="T23">П</text:span>араметры камеры</text:p>
      <text:p text:style-name="P29"/>
      <text:p text:style-name="P30"><text:span text:style-name="T24">EZTools </text:span><text:span text:style-name="T25">– </text:span><text:span text:style-name="T26">программа для настройки и конфигурации </text:span><text:span text:style-name="T27">камеры </text:span><text:span text:style-name="T28">(</text:span><text:span text:style-name="T27">ссылка для скачивания </text:span><text:a xlink:type="simple" xlink:href="https://www.uniview.com/Support/Download_Center/Tool/202404/990130_168459_0.htm" text:style-name="Internet_20_link" text:visited-style-name="Visited_20_Internet_20_Link"><text:span text:style-name="T27">https://www.uniview.com/Support/Download_Center/Tool/202404/990130_168459_0.htm</text:span></text:a><text:span text:style-name="T28">)</text:span></text:p>
      <text:p text:style-name="P31"/>
      <text:p text:style-name="P5"><draw:frame draw:style-name="fr5" draw:name="Изображение3" text:anchor-type="char" svg:width="17cm" svg:height="7.059cm" draw:z-index="5"><draw:image xlink:href="Pictures/10000000000004F50000020F930F98BA.png" xlink:type="simple" xlink:show="embed" xlink:actuate="onLoad" draw:mime-type="image/png"/></draw:frame><text:span text:style-name="T6">Рисунок </text:span><text:span text:style-name="T7">4</text:span><text:span text:style-name="T6"> — </text:span><text:span text:style-name="T7">Интерфейс EZTools <text:s/></text:span></text:p>
      <text:p text:style-name="P32"/>
      <text:p text:style-name="P33">Также камеру можно настроить через веб интерфейс в браузере<text:span text:style-name="T10">(http://192.168.10.13/)</text:span></text:p>
      <text:p text:style-name="P34"/>
      <text:p text:style-name="P35"><text:span text:style-name="T8">Стандартные данные </text:span>авторизации:</text:p>
      <text:p text:style-name="P35"><text:tab/><text:span text:style-name="T8">login: admin</text:span></text:p>
      <text:p text:style-name="P36"><text:s text:c="4"/><text:tab/>password: 123456 <text:span text:style-name="T29">(</text:span><text:span text:style-name="T30">стандартный пароль был заменён на 123456abc*</text:span><text:span text:style-name="T29">)</text:span></text:p>
      <text:p text:style-name="P36"/>
      <text:p text:style-name="P37">Ссылки для получения <text:span text:style-name="T10">RTSP </text:span>потоков:</text:p>
      <text:p text:style-name="P38"><text:span text:style-name="T24">"</text:span><text:span text:style-name="T31">rtsp://admin:</text:span><text:span text:style-name="T32">123456abc*</text:span><text:a xlink:type="simple" xlink:href="mailto:123456@192.168.10.13" text:style-name="Internet_20_link" text:visited-style-name="Visited_20_Internet_20_Link"><text:span text:style-name="T31">@192.168.10.13</text:span></text:a><text:span text:style-name="T31">:554/media/video0</text:span><text:span text:style-name="T24">" — </text:span><text:span text:style-name="T33">видеопоток</text:span></text:p>
      <text:p text:style-name="P38"><text:span text:style-name="T24">"</text:span><text:span text:style-name="T31">rtsp://admin:</text:span><text:span text:style-name="T32">123456abc*</text:span><text:a xlink:type="simple" xlink:href="mailto:123456@192.168.10.13" text:style-name="Internet_20_link" text:visited-style-name="Visited_20_Internet_20_Link"><text:span text:style-name="T31">@192.168.10.13</text:span></text:a><text:span text:style-name="T31">:554/media2/video0</text:span><text:span text:style-name="T24">" — </text:span><text:span text:style-name="T33">ИК - поток</text:span></text:p>
      <text:p text:style-name="P37"/>
      <text:p text:style-name="P39"/>
      <text:p text:style-name="P39"/>
      <text:p text:style-name="P39"/>
      <text:p text:style-name="P40"><text:soft-page-break/><text:span text:style-name="T24"><text:tab/>Для совместимости сети камеры и лидара с сетью ровера их п</text:span><text:span text:style-name="T34">о</text:span><text:span text:style-name="T24">дсети был</text:span><text:span text:style-name="T35">и</text:span><text:span text:style-name="T24"> заменены с</text:span><text:span text:style-name="T35">о</text:span><text:span text:style-name="T24"> </text:span><text:span text:style-name="T34">стандартной</text:span><text:span text:style-name="T24"> 192.168.1.</text:span><text:span text:style-name="T36">X/24 </text:span><text:span text:style-name="T24">на 192.168.10.</text:span><text:span text:style-name="T36">X/24 </text:span><text:span text:style-name="T24">это позволяет объединить сети в одну, на всех устройствах статические </text:span><text:span text:style-name="T36">ip – </text:span><text:span text:style-name="T24">адреса, их изменение </text:span><text:span text:style-name="T37">не рекомендуется, так как</text:span><text:span text:style-name="T24"> может повлиять на работоспособность системы. </text:span><text:span text:style-name="T37">В</text:span><text:span text:style-name="T38">се </text:span><text:span text:style-name="T39">ip </text:span><text:span text:style-name="T38">адреса в сети должны быть уникальными, но с </text:span><text:span text:style-name="T40">одинаковой</text:span><text:span text:style-name="T38"> подсетью. </text:span><text:span text:style-name="T34">Если производится подключение к коммутатору и этот коммутатор не подключён к </text:span><text:span text:style-name="T41">маршрутизатору</text:span><text:span text:style-name="T42">(</text:span><text:span text:style-name="T43">который выступает в роли </text:span><text:span text:style-name="T42">DHCP </text:span><text:span text:style-name="T43">сервера</text:span><text:span text:style-name="T42">), </text:span><text:span text:style-name="T41">то</text:span><text:span text:style-name="T34"> необходимо в параметрах адаптера сменить режим</text:span><text:span text:style-name="T41"> DHCP</text:span><text:span text:style-name="T34"> на ручной и указать </text:span><text:span text:style-name="T41">ip – </text:span><text:span text:style-name="T34">адрес, маску подсети </text:span><text:span text:style-name="T40">и шлюз</text:span><text:span text:style-name="T34">.</text:span></text:p>
      <text:p text:style-name="P41"><draw:frame draw:style-name="fr6" draw:name="Изображение8" text:anchor-type="char" svg:x="6.47cm" svg:y="0.012cm" svg:width="5.041cm" svg:height="6.489cm" draw:z-index="4"><draw:image xlink:href="Pictures/10000000000001EB000002FEF8C43931.png" xlink:type="simple" xlink:show="embed" xlink:actuate="onLoad" draw:mime-type="image/png"/></draw:frame></text:p>
      <text:p text:style-name="P41"/>
      <text:p text:style-name="P42"/>
      <text:p text:style-name="P43"/>
      <text:p text:style-name="P44"/>
      <text:p text:style-name="P44"/>
      <text:p text:style-name="P44"/>
      <text:p text:style-name="P44"/>
      <text:p text:style-name="P44"/>
      <text:p text:style-name="P45"/>
      <text:p text:style-name="P45"/>
      <text:p text:style-name="P44"/>
      <text:p text:style-name="P46"/>
      <text:p text:style-name="P5"><text:span text:style-name="T44">Рисунок </text:span><text:span text:style-name="T45">5</text:span><text:span text:style-name="T44"> — </text:span><text:span text:style-name="T45">Подключение к коммутатору</text:span></text:p>
      <text:p text:style-name="P44"/>
      <text:p text:style-name="P44">РОВЕР <text:span text:style-name="T10">DH:FRAME</text:span></text:p>
      <text:p text:style-name="P47"/>
      <text:p text:style-name="P48"><text:span text:style-name="T46"><text:tab/>Управление ровером осуществляется с помощью пульта или через веб-интерфейс. Для управления с пульта радиоприемник должен быть подключен к </text:span><text:span text:style-name="T47">USB </text:span><text:span text:style-name="T46">бортового одноплатного компьютера (</text:span><text:span text:style-name="T47">Orange Pi</text:span><text:span text:style-name="T46">), при управлении через веб интерфейс необходимо подключить провод от порта </text:span><text:span text:style-name="T47">USB </text:span><text:span text:style-name="T46">к контроллеру. Управление через веб-интерфейс возможно как по локальной сети</text:span><text:span text:style-name="T48">(через веб интерфейс </text:span><text:span text:style-name="T47">Orange Pi http://192.168.10.115/ - 192.168.10.115 </text:span><text:span text:style-name="T49">ip </text:span><text:span text:style-name="T48">адрес </text:span><text:span text:style-name="T47">Orange Pi</text:span><text:span text:style-name="T48">)</text:span><text:span text:style-name="T46"> так и удалённо через DH:CLOUD CONTROL CENTER — </text:span><text:span text:style-name="T48">который позволяет управлять ровером через интернет </text:span><text:span text:style-name="T49">(</text:span><text:span text:style-name="T48">ровер должен быть подключён к интернету</text:span><text:span text:style-name="T49">)</text:span><text:span text:style-name="T48">. Ровер оснащён маршрутизатором iRZ RL01w и для получения доступа к панели администрирования необходим</text:span><text:span text:style-name="T50">о</text:span><text:span text:style-name="T48"> быть подключенным к его сети</text:span><text:span text:style-name="T49">(</text:span><text:span text:style-name="T48">через </text:span><text:span text:style-name="T49">LAN </text:span><text:span text:style-name="T48">или точку доступа которую он раздаёт</text:span><text:span text:style-name="T49">) </text:span><text:span text:style-name="T48">и в поиске браузера ввести http://192.168.10.1/ (данные авторизации –</text:span><text:span text:style-name="T49"> </text:span><text:span text:style-name="T51">login</text:span><text:span text:style-name="T49">: root; </text:span><text:span text:style-name="T51">password</text:span><text:span text:style-name="T48">: </text:span><text:span text:style-name="T49">root</text:span><text:span text:style-name="T48">).</text:span></text:p>
      <text:p text:style-name="P49"><text:tab/><text:span text:style-name="T11">Чтобы ровер имел доступ к интернету к маршрутизатору можно подключить сим карту или перевести его </text:span>wi-fi <text:span text:style-name="T11">модуль в режим </text:span>STA-Client <text:span text:style-name="T11">или </text:span>STA-Bridge <text:span text:style-name="T11">и подключить его к сети с доступом в интернет(</text:span><text:span text:style-name="T52">режим </text:span>STA-Bridge<text:span text:style-name="T11"> </text:span><text:span text:style-name="T52">сделает сеть ровера частью сети к которой его подключат, что скорее всего приведёт к конфликту</text:span><text:span text:style-name="T53"> ip</text:span><text:span text:style-name="T52"> адресов поэтому лучше использовать </text:span>STA-Client<text:span text:style-name="T52">, который оставит локальную сеть ровера в прежнем состоянии и внешняя сеть будет </text:span><text:span text:style-name="T54">шлюзом</text:span><text:span text:style-name="T52"> по умолчанию</text:span><text:span text:style-name="T11">)</text:span><text:span text:style-name="T52">. При переводе в эти режимы точка доступа не работает, так что для настройки нужно использовать </text:span><text:span text:style-name="T53">LAN.</text:span></text:p>
      <text:p text:style-name="P50"><text:tab/><text:span text:style-name="T55">К бортовому компьютеру </text:span><text:span text:style-name="T56">Orange Pi </text:span><text:span text:style-name="T55">можно подключиться через </text:span><text:span text:style-name="T57">ssh.(</text:span><text:span text:style-name="T58">login: </text:span><text:span text:style-name="T55">r</text:span><text:span text:style-name="T57">oot </text:span><text:span text:style-name="T58">password: orangepi</text:span><text:span text:style-name="T57">)</text:span></text:p>
      <text:p text:style-name="P50"><text:tab/><text:span text:style-name="T2">WI-FI </text:span><text:span text:style-name="T59">сеть ровера называется </text:span><text:span text:style-name="T2">DH </text:span><text:span text:style-name="T59">пароль </text:span><text:span text:style-name="T2">12345678</text:span></text:p>
      <text:p text:style-name="P51"/>
      <text:p text:style-name="P52"><text:soft-page-break/>Таблица <text:span text:style-name="T10">IP – </text:span>адресов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3">Устройство </text:p>
          </table:table-cell>
          <table:table-cell table:style-name="Таблица1.B1" office:value-type="string">
            <text:p text:style-name="P54">IP</text:p>
          </table:table-cell>
        </table:table-row>
        <table:table-row>
          <table:table-cell table:style-name="Таблица1.A2" office:value-type="string">
            <text:p text:style-name="P55">Маршрутизатор ровера(<text:span text:style-name="T10">IRZ Mobile Router</text:span>)</text:p>
          </table:table-cell>
          <table:table-cell table:style-name="Таблица1.B2" office:value-type="string">
            <text:p text:style-name="P56">192.168.10.1</text:p>
          </table:table-cell>
        </table:table-row>
        <table:table-row>
          <table:table-cell table:style-name="Таблица1.A2" office:value-type="string">
            <text:p text:style-name="P57">Бортовой компьютер(<text:span text:style-name="T10">Orange Pi</text:span>)</text:p>
          </table:table-cell>
          <table:table-cell table:style-name="Таблица1.B2" office:value-type="string">
            <text:p text:style-name="P58">192.168.10.115</text:p>
          </table:table-cell>
        </table:table-row>
        <table:table-row>
          <table:table-cell table:style-name="Таблица1.A2" office:value-type="string">
            <text:p text:style-name="P55">Камера(<text:span text:style-name="T10">UNV </text:span><text:span text:style-name="T60">T</text:span><text:span text:style-name="T61">IC2626S-F35-4F12AC-13</text:span>)</text:p>
          </table:table-cell>
          <table:table-cell table:style-name="Таблица1.B2" office:value-type="string">
            <text:p text:style-name="P57">192.168.10.13</text:p>
          </table:table-cell>
        </table:table-row>
        <table:table-row>
          <table:table-cell table:style-name="Таблица1.A2" office:value-type="string">
            <text:p text:style-name="P57">Лидар <text:span text:style-name="T8">(TOF LiDAR AS-</text:span><text:span text:style-name="T61">21C)</text:span></text:p>
          </table:table-cell>
          <table:table-cell table:style-name="Таблица1.B2" office:value-type="string">
            <text:p text:style-name="P57">192.168.10.<text:span text:style-name="T10">82</text:span></text:p>
          </table:table-cell>
        </table:table-row>
        <table:table-row>
          <table:table-cell table:style-name="Таблица1.A2" office:value-type="string">
            <text:p text:style-name="P59">Камера ровера(IPC2122LB-ADF28KM-G)</text:p>
          </table:table-cell>
          <table:table-cell table:style-name="Таблица1.B2" office:value-type="string">
            <text:p text:style-name="P60">192.168.10.<text:span text:style-name="T62">126</text:span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499cm" style:writing-mode="page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2T10:49:04.025727000</meta:creation-date>
    <dc:date>2026-06-29T12:45:27.631051100</dc:date>
    <meta:editing-duration>PT3H48M17S</meta:editing-duration>
    <meta:editing-cycles>12</meta:editing-cycles>
    <meta:generator>LibreOffice/25.8.3.2$Windows_X86_64 LibreOffice_project/8ca8d55c161d602844f5428fa4b58097424e324e</meta:generator>
    <meta:document-statistic meta:table-count="1" meta:image-count="6" meta:object-count="0" meta:page-count="5" meta:paragraph-count="62" meta:word-count="609" meta:character-count="4694" meta:non-whitespace-character-count="4129"/>
  </office:meta>
</office:document-meta>
</file>